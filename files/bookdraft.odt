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3c44" officeooo:paragraph-rsid="000c9954"/>
    </style:style>
    <style:style style:name="P2" style:family="paragraph" style:parent-style-name="Standard">
      <style:text-properties officeooo:rsid="000b3c44" officeooo:paragraph-rsid="000cc89b"/>
    </style:style>
    <style:style style:name="P3" style:family="paragraph" style:parent-style-name="Standard">
      <style:text-properties officeooo:paragraph-rsid="000c9954"/>
    </style:style>
    <style:style style:name="P4" style:family="paragraph" style:parent-style-name="Standard">
      <style:text-properties officeooo:rsid="000c9954" officeooo:paragraph-rsid="000c9954"/>
    </style:style>
    <style:style style:name="T1" style:family="text">
      <style:text-properties officeooo:rsid="000b3c44"/>
    </style:style>
    <style:style style:name="T2" style:family="text">
      <style:text-properties officeooo:rsid="000c9954"/>
    </style:style>
    <style:style style:name="T3" style:family="text">
      <style:text-properties officeooo:rsid="000cc8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Physics for Poets<text:line-break/><text:line-break/>“</text:span>Could he, whose rules the rapid comet bind, </text:p>
      <text:p text:style-name="Standard">Describe or fix one movement of his mind? </text:p>
      <text:p text:style-name="Standard">Who saw its fires here rise, and there descend, </text:p>
      <text:p text:style-name="Standard">Explain his own beginning, or his end?”</text:p>
      <text:p text:style-name="P1">-<text:span text:style-name="T2">Alexander Pope, Epistle II</text:span><text:line-break/><text:line-break/><text:span text:style-name="T3">Pope argues that physics is </text:span><text:line-break/></text:p>
      <text:p text:style-name="P4">1. Thinking Like a Physicist</text:p>
      <text:p text:style-name="P1"><text:line-break/><text:span text:style-name="T2">To do this, physicists build models of the universe- interlocking systems of rules that aim to explain as many of our observations as possible using the smallest number of assumptions. Sometimes these models are weird and unintu</text:span></text:p>
      <text:p text:style-name="P1"/>
      <text:p text:style-name="P2"><text:line-break/><text:span text:style-name="T3">2</text:span>. Matter in Motion:<text:line-break/><text:line-break/><text:span text:style-name="T2">If poetry is the art of succinctly describing the image, physics is the art of describing motion. </text:span><text:span text:style-name="T3">What are the things that move in us? H</text:span><text:span text:style-name="T2">ow do they move,</text:span><text:span text:style-name="T3"> change, begin, and end?</text:span><text:span text:style-name="T2"><text:line-break/><text:line-break/>-</text:span><text:span text:style-name="T3">Newton’s Laws, Lagrangians, Hamiltonians<text:line-break/>-Emmy Noether and the Kaleidoscope</text:span><text:line-break/><text:line-break/>2. Electromagnetism<text:line-break/><text:line-break/>3. Einstein’s Idea: Part 1 (SR)<text:line-break/><text:line-break/>4. Quantum Mechanics<text:line-break/><text:line-break/><text:span text:style-name="T3">4.5 Thermodynamics Interlude: Why Newton Didn’t Need To Know Quantum Mechanics</text:span><text:line-break/><text:line-break/>5. Field Theory and the rise of the Standard Model<text:line-break/><text:line-break/>6. Einstein’s Idea: Part 2 (GR)<text:line-break/><text:line-break/><text:span text:style-name="T2">Space and time are </text:span><text:span text:style-name="T3">not absolute</text:span><text:span text:style-name="T2">, but connected. <text:line-break/><text:line-break/></text:span><text:line-break/><text:line-break/>7. Vera Rubin Finds Something Interesting<text:line-break/><text:line-break/><text:span text:style-name="T2">8. </text:span>Experiments<text:line-break/><text:line-break/>8. String Theor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4:38:25.703219319</meta:creation-date>
    <dc:date>2025-02-12T15:07:29.799973365</dc:date>
    <meta:editing-duration>PT7M31S</meta:editing-duration>
    <meta:editing-cycles>1</meta:editing-cycles>
    <meta:document-statistic meta:table-count="0" meta:image-count="0" meta:object-count="0" meta:page-count="1" meta:paragraph-count="8" meta:word-count="189" meta:character-count="1155" meta:non-whitespace-character-count="950"/>
    <meta:generator>LibreOffice/7.3.7.2$Linux_X86_64 LibreOffice_project/30$Build-2</meta:generator>
  </office:meta>
</office:document-meta>
</file>